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officeooo:rsid="0002a4f4" officeooo:paragraph-rsid="0002a4f4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3pt" style:text-underline-style="none" fo:font-weight="bold" officeooo:rsid="0002a4f4" officeooo:paragraph-rsid="0002a4f4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fo:font-size="13pt" style:text-underline-style="none" fo:font-weight="normal" officeooo:rsid="0002bad9" officeooo:paragraph-rsid="0002bad9" style:font-size-asian="11.3500003814697pt" style:font-weight-asian="normal" style:font-size-complex="13pt" style:font-weight-complex="normal"/>
    </style:style>
    <style:style style:name="P4" style:family="paragraph" style:parent-style-name="Standard">
      <style:text-properties fo:font-size="13pt" style:text-underline-style="none" fo:font-weight="normal" officeooo:rsid="00045d80" officeooo:paragraph-rsid="00045d80" style:font-size-asian="11.3500003814697pt" style:font-weight-asian="normal" style:font-size-complex="13pt" style:font-weight-complex="normal"/>
    </style:style>
    <style:style style:name="P5" style:family="paragraph" style:parent-style-name="Standard">
      <style:text-properties fo:font-size="13pt" style:text-underline-style="solid" style:text-underline-width="auto" style:text-underline-color="font-color" fo:font-weight="bold" officeooo:rsid="0002a4f4" officeooo:paragraph-rsid="0002a4f4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3pt" style:text-underline-style="none" fo:font-weight="bold" officeooo:rsid="0002a4f4" officeooo:paragraph-rsid="0002a4f4" style:font-size-asian="11.3500003814697pt" style:font-weight-asian="bold" style:font-size-complex="13pt" style:font-weight-complex="bold"/>
    </style:style>
    <style:style style:name="P7" style:family="paragraph" style:parent-style-name="Standard">
      <style:text-properties fo:font-size="18pt" style:text-underline-style="solid" style:text-underline-width="auto" style:text-underline-color="font-color" fo:font-weight="bold" officeooo:rsid="0002a4f4" officeooo:paragraph-rsid="00050048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8pt" style:text-underline-style="solid" style:text-underline-width="auto" style:text-underline-color="font-color" fo:font-weight="bold" officeooo:rsid="00050048" officeooo:paragraph-rsid="00050048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4pt" style:text-underline-style="none" fo:font-weight="normal" officeooo:rsid="00050048" officeooo:paragraph-rsid="00050048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style:text-underline-style="none" fo:font-weight="normal" officeooo:rsid="00050048" officeooo:paragraph-rsid="00056137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style:text-underline-style="none" fo:font-weight="normal" officeooo:rsid="00056137" officeooo:paragraph-rsid="00056137" style:font-size-asian="12.25pt" style:font-weight-asian="normal" style:font-size-complex="14pt" style:font-weight-complex="normal"/>
    </style:style>
    <style:style style:name="T1" style:family="text">
      <style:text-properties fo:font-variant="normal" fo:text-transform="none" fo:color="#800020" loext:opacity="100%" style:font-name="Consolas" fo:font-size="12pt" fo:letter-spacing="normal" fo:font-style="normal"/>
    </style:style>
    <style:style style:name="T2" style:family="text">
      <style:text-properties fo:font-variant="normal" fo:text-transform="none" style:font-name="Consolas" fo:font-size="11.25pt" fo:letter-spacing="normal" fo:font-style="normal" fo:font-weight="normal"/>
    </style:style>
    <style:style style:name="T3" style:family="text">
      <style:text-properties fo:font-variant="normal" fo:text-transform="none" style:font-name="Consolas" fo:font-size="11.25pt" fo:letter-spacing="normal" fo:font-style="normal" fo:font-weight="normal" officeooo:rsid="0002bad9"/>
    </style:style>
    <style:style style:name="T4" style:family="text">
      <style:text-properties fo:font-variant="normal" fo:text-transform="none" style:font-name="Consolas" fo:letter-spacing="normal" fo:font-style="normal"/>
    </style:style>
    <style:style style:name="T5" style:family="text">
      <style:text-properties fo:font-variant="normal" fo:text-transform="none" style:font-name="Consolas" fo:letter-spacing="normal" fo:font-style="normal" officeooo:rsid="0002bad9"/>
    </style:style>
    <style:style style:name="T6" style:family="text">
      <style:text-properties fo:font-variant="normal" fo:text-transform="none" style:font-name="Consolas" fo:letter-spacing="normal" fo:font-style="normal" officeooo:rsid="00050048"/>
    </style:style>
    <style:style style:name="T7" style:family="text">
      <style:text-properties fo:font-variant="normal" fo:text-transform="none" style:font-name="Consolas" fo:letter-spacing="normal" fo:font-style="normal" officeooo:rsid="00056137"/>
    </style:style>
    <style:style style:name="T8" style:family="text">
      <style:text-properties fo:font-variant="normal" fo:text-transform="none" style:font-name="Consolas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d4d4d4" loext:opacity="100%" fo:letter-spacing="normal"/>
    </style:style>
    <style:style style:name="T10" style:family="text">
      <style:text-properties officeooo:rsid="00033e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e 2</text:p>
      <text:p text:style-name="P1"/>
      <text:p text:style-name="P5">Hacer commit y push y crear el repository.</text:p>
      <text:p text:style-name="P2"/>
      <text:p text:style-name="P2"><text:span text:style-name="T1">git add .</text:span> </text:p>
      <text:p text:style-name="P3"/>
      <text:p text:style-name="P3"><text:span text:style-name="T10">g</text:span>it remote add origin “y aca va el link del repositorio creado, se hace 1 sola vez”</text:p>
      <text:p text:style-name="P4">este se crea en git hub.</text:p>
      <text:p text:style-name="P4"/>
      <text:p text:style-name="P2"><text:span text:style-name="T1">git commit -m</text:span> “”</text:p>
      <text:p text:style-name="P2"><text:span text:style-name="T2">git push -u origin</text:span><text:span text:style-name="T9"> </text:span><text:span text:style-name="T2">m</text:span><text:span text:style-name="T3">aster</text:span></text:p>
      <text:p text:style-name="P2"><text:span text:style-name="T3"/></text:p>
      <text:p text:style-name="P2"><text:span text:style-name="T3"/></text:p>
      <text:p text:style-name="P7"><text:span text:style-name="T5"/></text:p>
      <text:p text:style-name="P7"><text:span text:style-name="T5">Clase </text:span><text:span text:style-name="T6">3</text:span></text:p>
      <text:p text:style-name="P7"><text:span text:style-name="T6"/></text:p>
      <text:p text:style-name="P9"><text:span text:style-name="T4">crear una nueva rama en git</text:span></text:p>
      <text:p text:style-name="P9"><text:span text:style-name="T8">git checkout -b</text:span><text:span text:style-name="T4"> “nombre que le quiera dar a la rama”</text:span></text:p>
      <text:p text:style-name="P9"><text:span text:style-name="T4"/></text:p>
      <text:p text:style-name="P10"><text:span text:style-name="T7">(min 50)</text:span></text:p>
      <text:p text:style-name="P10"><text:span text:style-name="T4">para moverme entre ramas </text:span></text:p>
      <text:p text:style-name="P9"><text:span text:style-name="T8">git checkout</text:span><text:span text:style-name="T4"> “nombre de la rama”</text:span></text:p>
      <text:p text:style-name="P9"><text:span text:style-name="T4"/></text:p>
      <text:p text:style-name="P11"><text:span text:style-name="T4">hora 1:13 merge y conflictos.</text:span></text:p>
      <text:p text:style-name="P9"><text:span text:style-name="T4"/></text:p>
      <text:p text:style-name="P7"><text:span text:style-name="T6"/></text:p>
      <text:p text:style-name="P7"><text:span text:style-name="T6"/></text:p>
      <text:p text:style-name="P7"><text:span text:style-name="T6"/></text:p>
      <text:p text:style-name="P8"><text:span text:style-name="T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A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A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6-07-13T09:52:28.957000000</dc:date>
    <meta:editing-duration>PT38M17S</meta:editing-duration>
    <meta:editing-cycles>8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14" meta:word-count="81" meta:character-count="387" meta:non-whitespace-character-count="318"/>
  </office:meta>
</office:document-meta>
</file>